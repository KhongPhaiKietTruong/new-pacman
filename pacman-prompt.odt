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6a071" officeooo:paragraph-rsid="0016a071"/>
    </style:style>
    <style:style style:name="P2" style:family="paragraph" style:parent-style-name="Standard">
      <style:text-properties officeooo:rsid="0016a071" officeooo:paragraph-rsid="0034105a"/>
    </style:style>
    <style:style style:name="P3" style:family="paragraph" style:parent-style-name="Standard">
      <style:text-properties officeooo:rsid="002b7d30" officeooo:paragraph-rsid="002b7d30"/>
    </style:style>
    <style:style style:name="P4" style:family="paragraph" style:parent-style-name="Text_20_body">
      <style:text-properties fo:font-weight="normal" officeooo:rsid="0016a071" officeooo:paragraph-rsid="0016a071" style:font-weight-asian="normal" style:font-weight-complex="normal"/>
    </style:style>
    <style:style style:name="P5" style:family="paragraph" style:parent-style-name="Text_20_body">
      <style:text-properties fo:font-weight="normal" officeooo:rsid="0016a071" style:font-weight-asian="normal" style:font-weight-complex="normal"/>
    </style:style>
    <style:style style:name="P6" style:family="paragraph" style:parent-style-name="Text_20_body">
      <style:paragraph-properties fo:margin-left="0in" fo:margin-right="0in" fo:margin-top="0in" fo:margin-bottom="0in" style:contextual-spacing="false" fo:text-indent="0in" style:auto-text-indent="false" fo:padding="0in" fo:border="none"/>
      <style:text-properties officeooo:rsid="0016a071"/>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officeooo:rsid="0016a071" officeooo:paragraph-rsid="001da218"/>
    </style:style>
    <style:style style:name="P8" style:family="paragraph" style:parent-style-name="Standard">
      <style:paragraph-properties fo:margin-left="0in" fo:margin-right="0in" fo:margin-top="0in" fo:margin-bottom="0in" style:contextual-spacing="false" fo:text-indent="0in" style:auto-text-indent="false" fo:padding="0in" fo:border="none"/>
      <style:text-properties style:font-name="Times New Roman" officeooo:rsid="0016a071" officeooo:paragraph-rsid="001da218"/>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officeooo:rsid="0016a071" officeooo:paragraph-rsid="001d08d6"/>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style:font-name="Times New Roman" officeooo:paragraph-rsid="001d08d6"/>
    </style:style>
    <style:style style:name="P11" style:family="paragraph" style:parent-style-name="Text_20_body">
      <style:paragraph-properties fo:margin-left="0in" fo:margin-right="0in" fo:margin-top="0in" fo:margin-bottom="0.0972in" style:contextual-spacing="false" fo:line-height="114%" fo:text-indent="0in" style:auto-text-indent="false"/>
      <style:text-properties style:font-name="Times New Roman" fo:font-style="italic"/>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officeooo:rsid="002b7d30"/>
    </style:style>
    <style:style style:name="P13" style:family="paragraph" style:parent-style-name="Standard">
      <style:text-properties officeooo:paragraph-rsid="002d2865"/>
    </style:style>
    <style:style style:name="P14" style:family="paragraph" style:parent-style-name="Standard">
      <style:text-properties officeooo:rsid="002d2865" officeooo:paragraph-rsid="002d2865"/>
    </style:style>
    <style:style style:name="P15" style:family="paragraph" style:parent-style-name="Heading_20_3">
      <style:text-properties officeooo:rsid="002d2865" officeooo:paragraph-rsid="002d2865"/>
    </style:style>
    <style:style style:name="P16" style:family="paragraph" style:parent-style-name="Text_20_body" style:list-style-name="L1">
      <style:text-properties officeooo:rsid="002d2865"/>
    </style:style>
    <style:style style:name="P17" style:family="paragraph" style:parent-style-name="Heading_20_3">
      <style:text-properties officeooo:rsid="002d2865"/>
    </style:style>
    <style:style style:name="P18" style:family="paragraph" style:parent-style-name="Text_20_body">
      <style:text-properties officeooo:rsid="002d2865"/>
    </style:style>
    <style:style style:name="P19" style:family="paragraph" style:parent-style-name="Text_20_body" style:list-style-name="L2">
      <style:text-properties officeooo:rsid="002d2865"/>
    </style:style>
    <style:style style:name="P20" style:family="paragraph" style:parent-style-name="Text_20_body" style:list-style-name="L2">
      <style:text-properties fo:font-weight="bold" officeooo:rsid="002d2865"/>
    </style:style>
    <style:style style:name="P21" style:family="paragraph" style:parent-style-name="Text_20_body" style:list-style-name="L3">
      <style:text-properties officeooo:rsid="002d2865"/>
    </style:style>
    <style:style style:name="P22" style:family="paragraph" style:parent-style-name="Text_20_body" style:list-style-name="L3">
      <style:text-properties fo:font-weight="bold" officeooo:rsid="002d2865"/>
    </style:style>
    <style:style style:name="P23" style:family="paragraph" style:parent-style-name="Text_20_body" style:list-style-name="L4">
      <style:text-properties officeooo:rsid="002d2865"/>
    </style:style>
    <style:style style:name="T1" style:family="text">
      <style:text-properties officeooo:rsid="0016a071"/>
    </style:style>
    <style:style style:name="T2" style:family="text">
      <style:text-properties officeooo:rsid="002d2865"/>
    </style:style>
    <style:style style:name="T3" style:family="text">
      <style:text-properties fo:font-family="'Google Sans Text', sans-serif"/>
    </style:style>
    <style:style style:name="T4" style:family="text">
      <style:text-properties fo:font-weight="bold"/>
    </style:style>
    <style:style style:name="T5"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sử dụng thư viện pygame</text:p>
      <text:p text:style-name="Standard">game có màn hình chờ gồm: tên game: pacman, menu gồm các nút chơi (kế bên là chọn chế độ chơi), cài đặt (cho phép chỉnh thuật toán / hàm heuristic của mỗi con ma hoặc pacman (trong chế độ ai vs ai))</text:p>
      <text:p text:style-name="Standard">blind search: dfs, bfs</text:p>
      <text:p text:style-name="Standard">informed search: greedy, A*</text:p>
      <text:p text:style-name="Standard"/>
      <text:p text:style-name="Standard">mục đích cuối cùng của game là diệt hết ma (các chấm nhỏ không có tác dụng)</text:p>
      <text:p text:style-name="Standard"/>
      <text:p text:style-name="P1">Cài đặt các con ma:</text:p>
      <text:p text:style-name="P1">ma đỏ: A* đích là vị trí của pacman</text:p>
      <text:p text:style-name="P1">ma hồng: <text:s/>đến điểm trước pacman 4 ô (đón đầu) sử dụng greedy</text:p>
      <text:p text:style-name="P1">ma xanh: DFS thêm giới hạn độ sâu (10 bước)</text:p>
      <text:p text:style-name="P2">ma cam: nhiệm vụ bọc lót (điểm đến là nơi sẽ kẹp pacman ở giữa ma đỏ và chính nó) sử dụng phép chiếu để tìm ra ô đích sau đó dùng BFS để đi đến đó</text:p>
      <text:p text:style-name="P1"/>
      <text:p text:style-name="P3">mỗi con ma sẽ có bóng mờ với màu tương ứng dưới đường đi thể hiện độ loang của thuật toán đường đi của con ma </text:p>
      <text:p text:style-name="P1"/>
      <text:p text:style-name="P1">trong chế độ ai vs ai, pacman sẽ được áp dụng A* biến đổi với heuristic được áp thêm các yếu tố để né ma và ăn ma (khi ăn được viên sức mạnh)</text:p>
      <text:p text:style-name="P1"/>
      <text:p text:style-name="P1">khi pacman ăn được viên sức mạnh: các con ma chuyển xanh dương trong 7 , pacman có đồ họa đẹp hơn và chạy nhanh, các con ma sẽ vẫn giữ nguyên các thuật toán ai của nó nhưng đổi mục tiêu thành chạy về góc tường và khi về được góc của nó, nó sẽ đi lanh quanh đó</text:p>
      <text:p text:style-name="P1"/>
      <text:p text:style-name="P4">Ma Đỏ (Blinky): Chạy về góc Trên - Phải</text:p>
      <text:p text:style-name="P5">Ma Hồng (Pinky): Chạy về góc Trên - Trái</text:p>
      <text:p text:style-name="P5">Ma Xanh (Inky): Chạy về góc Dưới - Phải</text:p>
      <text:p text:style-name="P5">Ma Cam (Clyde): Chạy về góc Dưới – Trái</text:p>
      <text:p text:style-name="P5"/>
      <text:p text:style-name="P5">sử dụng python (thư viện pygame)</text:p>
      <text:p text:style-name="P6">cửa sổ game toàn màn hình, có thanh điều chỉnh độ phức tạp của bản đồ (độ phức tạp của các bức tường), kích thước bản đồ không được quá nhỏ (màn hình tôi là 14 inch</text:p>
      <text:p text:style-name="P6">cấu trúc bản đồ là mảng hai chiều (0 là đường đi, 1 là tường, 2 là viên sức mạnh), mục tiêu game là diệt được hết ma sẽ chiến thắng</text:p>
      <text:p text:style-name="P6">ma không được quay đầu 180 độ nhưng ngay khoảnh khắc pacman ăn được viên sức mạnh thì ma được quay đầu 180 độ một lần duy nhất</text:p>
      <text:p text:style-name="P6">giới hạn độ sâu cho ma xanh (dùng DFS)</text:p>
      <text:p text:style-name="P6"/>
      <text:p text:style-name="P6">tuần suất tính đường đi: chỉ khi con ma tại giao <text:line-break/>pacman tìm đường đến viên sức mạnh gần nhất, ăn xong thì tìm tiếp viên sức mạnh gần nhất <text:line-break/><text:line-break/>khi thời gian của sức mạnh pacman sắp hết sẽ có animation ma và pacman nhấp nháy trở về trạng thái <text:line-break/><text:soft-page-break/><text:line-break/>hàm heuristic của pacman phải né được ma với heuristic như sau:<text:line-break/>h(n) = h_viên sm(n) + c_ghost(n)</text:p>
      <text:p text:style-name="P7">dùng khoảng cách mahattan cho h_viên sức mạnh (n) tới viên sức mạnh gần nhất</text:p>
      <text:p text:style-name="P7"/>
      <text:p text:style-name="P7">với c_ghost(n) trong trạng thái bình thường (ma rượt pacman) là:</text:p>
      <text:p text:style-name="P8">$$h(n) = \text{Manhattan(Viên sức mạnh gần nhất)} + \sum_{i=1}^{k} \frac{\text{Trọng số phạt}}{\text{Khoảng cách tới ma}_i}$$</text:p>
      <text:p text:style-name="P7"><text:s/>với k là số lượng con ma nằm trong khoảng cách 4 ô xung quanh </text:p>
      <text:p text:style-name="P9"/>
      <text:p text:style-name="P9">với c_ghost(n) trong trạng thái pacman rượt ma là:</text:p>
      <text:p text:style-name="P10"><text:span text:style-name="T1">- </text:span>$$h(n) = \text{Manhattan(Con ma yếu thế gần nhất)}$$</text:p>
      <text:p text:style-name="P11">(Kèm theo điều kiện ngầm: Nếu thời gian sức mạnh chỉ còn đếm ngược $\le 2$ giây, thuật toán phải lập tức hủy trạng thái này và quay lại công thức số 1 để Pacman biết đường bỏ chạy).</text:p>
      <text:p text:style-name="P9"/>
      <text:p text:style-name="P9">hiệu ứng animation đẹp khi ma bị ăn</text:p>
      <text:p text:style-name="P9"/>
      <text:p text:style-name="P9">lúc đầu có 4 viên sức mạnh ở 4 góc, sau khi ăn hết rồi mà ma vẫn chưa bị giết hết thì cứ 15 giây sẽ spawn ngẫu nhiên trên bản đồ một viên sức</text:p>
      <text:p text:style-name="P9"/>
      <text:p text:style-name="P9">ma bị giết xong sẽ mất vĩnh viễn chứ không respawn lại vì mục đích của game là diệt hết ma</text:p>
      <text:p text:style-name="P6"/>
      <text:p text:style-name="P12">xong màn chơi sẽ in ra các số liệu như thời gian chơi, số bước</text:p>
      <text:p text:style-name="P6"/>
      <text:p text:style-name="P6">khi pacman bị ma bắt được thì pacman sẽ thua</text:p>
      <text:p text:style-name="P1"/>
      <text:p text:style-name="P1"/>
      <text:p text:style-name="P13"><text:span text:style-name="T2">khi pacman ăn hết các viên sức mạnh và đang chờ viên mới spawn ra thì pacman sử dụng một hàm heuristic dự phòng dùng để né các con ma: </text:span><text:span text:style-name="T3">$$h(n) = - \min_{i=1}^{4} \left( \text{Manhattan}(n, \text{Ghost}_i) \right)$$</text:span></text:p>
      <text:p text:style-name="P14"/>
      <text:p text:style-name="P14"/>
      <text:p text:style-name="P14">mỗi con ma sẽ có đường đi (nét đứt) là kết quả của phép loang, đường đi đó được update liên tục</text:p>
      <text:p text:style-name="P14"/>
      <text:p text:style-name="P14">pacman chỉ có một mạng, khi bị ma bắt thì game over</text:p>
      <text:p text:style-name="P14"/>
      <text:p text:style-name="P14">khi màn chơi kết thúc, in ra các số liệu như thời gian chơi, số lần chuyển hướng, ... có nút chơi lại hoặc thoát ra</text:p>
      <text:p text:style-name="P14"/>
      <text:p text:style-name="P14">trong chế độ ai vs ai, pacman phải có animation thể hiện độ loan của thuật toán</text:p>
      <text:p text:style-name="P14">cd </text:p>
      <text:h text:style-name="P15" text:outline-level="3">1. Bảng màu chủ đạo (Color Palette)</text:h>
      <text:list text:style-name="L1">
        <text:list-item>
          <text:p text:style-name="P16"><text:span text:style-name="T4">Background (Nền):</text:span> Xanh navy cực tối hoặc đen nhám có ánh xanh (<text:span text:style-name="Source_20_Text">#0B0C10</text:span> hoặc <text:span text:style-name="Source_20_Text">#050A1F</text:span>) để làm nổi bật các thực thể phát sáng.</text:p>
        </text:list-item>
        <text:list-item>
          <text:p text:style-name="P16"><text:span text:style-name="T4">Tường (Walls):</text:span> Xanh dương neon (<text:span text:style-name="Source_20_Text">#00E5FF</text:span> hoặc <text:span text:style-name="Source_20_Text">#1F51FF</text:span>).</text:p>
        </text:list-item>
        <text:list-item>
          <text:p text:style-name="P16"><text:soft-page-break/><text:span text:style-name="T4">Text &amp; UI Elements:</text:span> Trắng tuyết hoặc xanh ngọc nhạt, sử dụng font chữ Pixel Monospace (như font <text:span text:style-name="T5">Press Start 2P</text:span> hoặc một font terminal gọn gàng).</text:p>
        </text:list-item>
      </text:list>
      <text:h text:style-name="P17" text:outline-level="3">2. Màn hình chờ (Main Menu)</text:h>
      <text:p text:style-name="P18">Bố cục được căn giữa, tận dụng nhiều không gian trống (negative space) để tạo cảm giác chuyên nghiệp, không rối mắt.</text:p>
      <text:list text:style-name="L2">
        <text:list-item>
          <text:p text:style-name="P19"><text:span text:style-name="T4">Tiêu đề game:</text:span> Chữ "PACMAN" to, nét pixel sắc sảo. Có hiệu ứng "Breathing" (sáng lên và mờ đi nhẹ nhàng) hoặc một luồng sáng xanh chạy dọc theo viền chữ.</text:p>
        </text:list-item>
        <text:list-item>
          <text:p text:style-name="P20">Menu lựa chọn:</text:p>
          <text:list>
            <text:list-item>
              <text:p text:style-name="P19">Các nút bấm (Play, Settings, Exit) chỉ bao gồm text dạng pixel trơn. Khi hover chuột vào, một mũi tên nhỏ <text:span text:style-name="Source_20_Text">&gt;</text:span> sẽ xuất hiện bên trái, hoặc text đổi sang màu xanh neon sáng.</text:p>
            </text:list-item>
            <text:list-item>
              <text:p text:style-name="P19">Góc chọn chế độ (Player vs AI / AI vs AI) được thiết kế dạng công tắc chuyển đổi (toggle switch) vuông vức.</text:p>
            </text:list-item>
          </text:list>
        </text:list-item>
        <text:list-item>
          <text:p text:style-name="P19"><text:span text:style-name="T4">Thanh điều chỉnh độ phức tạp:</text:span> Một thanh trượt (slider) mỏng, vạch mức rõ ràng. Cục nắm (thumb) là một khối vuông nhỏ. Khi kéo, các ô vuông pixel li ti sẽ bay ra từ thanh trượt tạo cảm giác tương tác vật lý.</text:p>
        </text:list-item>
      </text:list>
      <text:h text:style-name="P17" text:outline-level="3">3. Giao diện trong Game (Gameplay)</text:h>
      <text:list text:style-name="L3">
        <text:list-item>
          <text:p text:style-name="P21"><text:span text:style-name="T4">Bản đồ:</text:span> Các bức tường chỉ là những đường line pixel mỏng, sắc nét (1-2 pixels) màu xanh neon, không cần tô đặc bên trong khối tường. Điều này giúp đường đi của Pacman và các nét đứt thuật toán nổi bật hơn.</text:p>
        </text:list-item>
        <text:list-item>
          <text:p text:style-name="P21"><text:span text:style-name="T4">Pacman:</text:span> Màu vàng sáng truyền thống để tạo độ tương phản mạnh nhất trên nền xanh tối. Khi di chuyển, để lại một dải hạt pixel nhỏ mờ dần phía sau (trail effect).</text:p>
        </text:list-item>
        <text:list-item>
          <text:p text:style-name="P22">Bóng mờ thuật toán (AI Paths):</text:p>
          <text:list>
            <text:list-item>
              <text:p text:style-name="P21">Sử dụng nét đứt pixel tinh tế (ví dụ: 2 pixel sáng, 2 pixel chìm).</text:p>
            </text:list-item>
            <text:list-item>
              <text:p text:style-name="P21">Mỗi đường nét đứt mang màu của con ma tương ứng (Đỏ, Hồng, Xanh, Cam) với độ trong suốt (Alpha) khoảng 40-50% để không che lấp bản đồ.</text:p>
            </text:list-item>
          </text:list>
        </text:list-item>
        <text:list-item>
          <text:p text:style-name="P22">Hiệu ứng ăn Viên Sức Mạnh (Power Pellet):</text:p>
          <text:list>
            <text:list-item>
              <text:p text:style-name="P21">Ngay khoảnh khắc ăn được, màn hình chớp nhẹ một luồng sáng xanh dương.</text:p>
            </text:list-item>
            <text:list-item>
              <text:p text:style-name="P21">Pacman chuyển sang trạng thái "Power Mode": Xung quanh tỏa ra một vầng hào quang (aura) dạng pixel, màu vàng rực hoặc trắng sáng, tốc độ khung hình animation nhanh hơn.</text:p>
            </text:list-item>
            <text:list-item>
              <text:p text:style-name="P21">Các con ma đồng loạt chuyển sang màu xanh dương thẫm (<text:span text:style-name="Source_20_Text">#1A237E</text:span>), mắt biến thành hai dấu <text:span text:style-name="Source_20_Text">X</text:span> hoặc các vạch ngang màu trắng sợ hãi.</text:p>
            </text:list-item>
          </text:list>
        </text:list-item>
        <text:list-item>
          <text:p text:style-name="P21"><text:span text:style-name="T4">Hiệu ứng diệt ma:</text:span> Khi Pacman ăn ma, không có vụ nổ rườm rà. Con ma vỡ vụn thành hàng chục khối vuông pixel nhỏ văng ra xung quanh và tan biến vào bóng tối chỉ trong 0.5 giây.</text:p>
        </text:list-item>
      </text:list>
      <text:h text:style-name="P17" text:outline-level="3"><text:soft-page-break/>4. Màn hình Kết thúc (Game Over / Victory)</text:h>
      <text:list text:style-name="L4">
        <text:list-item>
          <text:p text:style-name="P23">Một lớp phủ (overlay) màu xanh đen bán trong suốt hạ xuống, làm mờ nhẹ (blur) hoặc tối đi bản đồ phía sau.</text:p>
        </text:list-item>
        <text:list-item>
          <text:p text:style-name="P23"><text:span text:style-name="T4">Bảng Thống Kê (Stats Panel):</text:span> Hiển thị ở giữa màn hình giống như một bảng log dữ liệu của hệ thống, căn lề thẳng hàng:</text:p>
          <text:list>
            <text:list-item>
              <text:p text:style-name="P23"><text:span text:style-name="Source_20_Text">THỜI GIAN : 02:45</text:span></text:p>
            </text:list-item>
            <text:list-item>
              <text:p text:style-name="P23"><text:span text:style-name="Source_20_Text">SỐ BƯỚC ĐI : 342</text:span></text:p>
            </text:list-item>
            <text:list-item>
              <text:p text:style-name="P23"><text:span text:style-name="Source_20_Text">LẦN CHUYỂN HƯỚNG: 87</text:span></text:p>
            </text:list-item>
          </text:list>
        </text:list-item>
        <text:list-item>
          <text:p text:style-name="P23">Hai nút bấm đơn giản, viền pixel mỏng ở dưới: <text:span text:style-name="Source_20_Text">[ CHƠI LẠI ]</text:span> và <text:span text:style-name="Source_20_Text">[ THOÁT ]</text:span>.</text:p>
        </text:list-item>
      </text:lis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7T23:45:47.296329293</meta:creation-date>
    <dc:date>2026-06-08T22:53:15.020255916</dc:date>
    <meta:editing-duration>PT12H2M53S</meta:editing-duration>
    <meta:editing-cycles>16</meta:editing-cycles>
    <meta:generator>LibreOffice/26.2.4.2$Linux_X86_64 LibreOffice_project/c44d3140fc62714965bf5d98735e0d79ba4b1ebd</meta:generator>
    <meta:document-statistic meta:table-count="0" meta:image-count="0" meta:object-count="0" meta:page-count="4" meta:paragraph-count="70" meta:word-count="1392" meta:character-count="6454" meta:non-whitespace-character-count="5145"/>
  </office:meta>
</office:document-meta>
</file>